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 xmlns:text="urn:oasis:names:tc:opendocument:xmlns:text:1.0" text:style-name="P1">AutoShow ODF Extraction Test</text:p>
      <text:p xmlns:text="urn:oasis:names:tc:opendocument:xmlns:text:1.0" text:style-name="P1">This document is an OpenDocument Text file used to verify the ODF extraction pipeline.</text:p>
      <text:p xmlns:text="urn:oasis:names:tc:opendocument:xmlns:text:1.0" text:style-name="P1">The extractor reads content.xml directly from the ZIP archive using node:zlib for decompression.</text:p>
      <text:p xmlns:text="urn:oasis:names:tc:opendocument:xmlns:text:1.0" text:style-name="P1">Namespace prefixes such as text: and office: are stripped before scanning paragraph elements.</text:p>
      <text:p xmlns:text="urn:oasis:names:tc:opendocument:xmlns:text:1.0" text:style-name="P1">All text:p elements are collected and joined to produce the final extraction output.</text:p>
    </office:text>
  </office:body>
</office:document-content>
</file>

<file path=styles.xml><?xml version="1.0" encoding="utf-8"?>
<office:document-styles xmlns:office="urn:oasis:names:tc:opendocument:xmlns:office:1.0"/>
</file>